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Flex" svg:font-family="'Google Sans Flex', 'Google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Horizontal_20_Line">
      <style:paragraph-properties fo:line-height="175%"/>
    </style:style>
    <style:style style:name="P2" style:family="paragraph" style:parent-style-name="Heading_20_2">
      <style:paragraph-properties fo:margin-left="0in" fo:margin-right="0in" fo:margin-top="0.2917in" fo:margin-bottom="0.0835in" style:contextual-spacing="false" style:line-height-at-least="0.2917in" fo:text-indent="0in" style:auto-text-indent="false"/>
      <style:text-properties style:font-name="Google Sans Flex" fo:font-size="15pt" fo:letter-spacing="normal" fo:font-weight="bold" loext:padding="0in" loext:border="none"/>
    </style:style>
    <style:style style:name="P3" style:family="paragraph" style:parent-style-name="Text_20_body">
      <style:paragraph-properties fo:margin-left="0in" fo:margin-right="0in" fo:margin-top="0in" fo:margin-bottom="0.1665in" style:contextual-spacing="false" fo:line-height="175%" fo:text-indent="0in" style:auto-text-indent="false"/>
      <style:text-properties style:font-name="Google Sans Flex" fo:font-size="12pt" fo:letter-spacing="normal" fo:font-weight="normal" loext:padding="0in" loext:border="none"/>
    </style:style>
    <style:style style:name="P4" style:family="paragraph" style:parent-style-name="Text_20_body">
      <style:paragraph-properties fo:margin-left="0in" fo:margin-right="0in" fo:margin-top="0in" fo:margin-bottom="0.0835in" style:contextual-spacing="false" fo:line-height="175%" fo:text-indent="0in" style:auto-text-indent="false"/>
      <style:text-properties style:font-name="Google Sans Flex" fo:font-size="12pt" fo:letter-spacing="normal" fo:font-weight="normal" loext:padding="0in" loext:border="none"/>
    </style:style>
    <style:style style:name="P5" style:family="paragraph" style:parent-style-name="Text_20_body">
      <style:paragraph-properties fo:margin-left="0in" fo:margin-right="0in" fo:margin-top="0in" fo:margin-bottom="0.0835in" style:contextual-spacing="false" fo:line-height="175%" fo:text-indent="0in" style:auto-text-indent="false"/>
      <style:text-properties style:font-name="Google Sans Flex" fo:font-size="12pt" fo:letter-spacing="normal" fo:font-weight="bold" loext:padding="0in" loext:border="none"/>
    </style:style>
    <style:style style:name="P6" style:family="paragraph" style:parent-style-name="Heading_20_2">
      <style:paragraph-properties fo:margin-left="0in" fo:margin-right="0in" fo:orphans="2" fo:widows="2" fo:text-indent="0in" style:auto-text-indent="false"/>
      <style:text-properties fo:font-variant="normal" fo:text-transform="none" fo:color="#e3e3e3" loext:opacity="100%" style:font-name="Times New Roman" fo:letter-spacing="normal" fo:font-style="normal" fo:font-weight="normal"/>
    </style:style>
    <style:style style:name="P7" style:family="paragraph" style:parent-style-name="Text_20_body">
      <style:text-properties loext:padding="0in" loext:border="none"/>
    </style:style>
    <style:style style:name="P8" style:family="paragraph" style:parent-style-name="Text_20_body" style:list-style-name="L1">
      <style:paragraph-properties fo:margin-left="0in" fo:margin-right="0in" fo:margin-top="0.0835in" fo:margin-bottom="0.0835in" style:contextual-spacing="false" fo:line-height="175%" fo:text-indent="0in" style:auto-text-indent="false" fo:padding="0in" fo:border="none"/>
      <style:text-properties style:font-name="Google Sans Flex" fo:font-size="12pt" fo:letter-spacing="normal" fo:font-weight="normal" loext:padding="0in" loext:border="none"/>
    </style:style>
    <style:style style:name="P9" style:family="paragraph" style:parent-style-name="Text_20_body" style:list-style-name="L2">
      <style:paragraph-properties fo:margin-left="0in" fo:margin-right="0in" fo:margin-top="0.0835in" fo:margin-bottom="0.0835in" style:contextual-spacing="false" fo:line-height="175%" fo:text-indent="0in" style:auto-text-indent="false" fo:padding="0in" fo:border="none"/>
      <style:text-properties style:font-name="Google Sans Flex" fo:font-size="12pt" fo:letter-spacing="normal" fo:font-weight="normal" loext:padding="0in" loext:border="none"/>
    </style:style>
    <style:style style:name="P10" style:family="paragraph" style:parent-style-name="Text_20_body" style:list-style-name="L3">
      <style:paragraph-properties fo:margin-left="0in" fo:margin-right="0in" fo:margin-top="0.0835in" fo:margin-bottom="0.0835in" style:contextual-spacing="false" fo:line-height="175%" fo:text-indent="0in" style:auto-text-indent="false" fo:padding="0in" fo:border="none"/>
      <style:text-properties style:font-name="Google Sans Flex" fo:font-size="12pt" fo:letter-spacing="normal" fo:font-weight="normal" loext:padding="0in" loext:border="none"/>
    </style:style>
    <style:style style:name="P11" style:family="paragraph" style:parent-style-name="Text_20_body" style:list-style-name="L4">
      <style:paragraph-properties fo:margin-left="0in" fo:margin-right="0in" fo:margin-top="0.0835in" fo:margin-bottom="0.0835in" style:contextual-spacing="false" fo:line-height="175%" fo:text-indent="0in" style:auto-text-indent="false" fo:padding="0in" fo:border="none"/>
      <style:text-properties style:font-name="Google Sans Flex" fo:font-size="12pt" fo:letter-spacing="normal" fo:font-weight="normal" loext:padding="0in" loext:border="none"/>
    </style:style>
    <style:style style:name="P12" style:family="paragraph" style:parent-style-name="Text_20_body" style:list-style-name="L5">
      <style:paragraph-properties fo:margin-left="0in" fo:margin-right="0in" fo:margin-top="0.0835in" fo:margin-bottom="0.0835in" style:contextual-spacing="false" fo:line-height="175%" fo:text-indent="0in" style:auto-text-indent="false" fo:padding="0in" fo:border="none"/>
      <style:text-properties style:font-name="Google Sans Flex" fo:font-size="12pt" fo:letter-spacing="normal" fo:font-weight="normal" loext:padding="0in" loext:border="none"/>
    </style:style>
    <style:style style:name="P13" style:family="paragraph" style:parent-style-name="Text_20_body" style:list-style-name="L6">
      <style:paragraph-properties fo:margin-left="0in" fo:margin-right="0in" fo:margin-top="0.0835in" fo:margin-bottom="0.0835in" style:contextual-spacing="false" fo:line-height="175%" fo:text-indent="0in" style:auto-text-indent="false" fo:padding="0in" fo:border="none"/>
      <style:text-properties style:font-name="Google Sans Flex" fo:font-size="12pt" fo:letter-spacing="normal" fo:font-weight="normal" loext:padding="0in" loext:border="none"/>
    </style:style>
    <style:style style:name="P14" style:family="paragraph" style:parent-style-name="Text_20_body" style:list-style-name="L8">
      <style:paragraph-properties fo:margin-left="0in" fo:margin-right="0in" fo:margin-top="0.0835in" fo:margin-bottom="0.0835in" style:contextual-spacing="false" fo:line-height="175%" fo:text-indent="0in" style:auto-text-indent="false" fo:padding="0in" fo:border="none"/>
      <style:text-properties style:font-name="Google Sans Flex" fo:font-size="12pt" fo:letter-spacing="normal" fo:font-weight="normal" loext:padding="0in" loext:border="none"/>
    </style:style>
    <style:style style:name="P15" style:family="paragraph" style:parent-style-name="Text_20_body" style:list-style-name="L9">
      <style:paragraph-properties fo:margin-left="0in" fo:margin-right="0in" fo:margin-top="0.0835in" fo:margin-bottom="0.0835in" style:contextual-spacing="false" fo:line-height="175%" fo:text-indent="0in" style:auto-text-indent="false" fo:padding="0in" fo:border="none"/>
      <style:text-properties style:font-name="Google Sans Flex" fo:font-size="12pt" fo:letter-spacing="normal" fo:font-weight="normal" loext:padding="0in" loext:border="none"/>
    </style:style>
    <style:style style:name="P16" style:family="paragraph" style:parent-style-name="Text_20_body" style:list-style-name="L10">
      <style:paragraph-properties fo:margin-left="0in" fo:margin-right="0in" fo:margin-top="0.0835in" fo:margin-bottom="0.0835in" style:contextual-spacing="false" fo:line-height="175%" fo:text-indent="0in" style:auto-text-indent="false" fo:padding="0in" fo:border="none"/>
      <style:text-properties style:font-name="Google Sans Flex" fo:font-size="12pt" fo:letter-spacing="normal" fo:font-weight="normal" loext:padding="0in" loext:border="none"/>
    </style:style>
    <style:style style:name="P17" style:family="paragraph" style:parent-style-name="Text_20_body" style:list-style-name="L11">
      <style:paragraph-properties fo:margin-left="0in" fo:margin-right="0in" fo:margin-top="0.0835in" fo:margin-bottom="0.0835in" style:contextual-spacing="false" fo:line-height="175%" fo:text-indent="0in" style:auto-text-indent="false" fo:padding="0in" fo:border="none"/>
      <style:text-properties style:font-name="Google Sans Flex" fo:font-size="12pt" fo:letter-spacing="normal" fo:font-weight="normal" loext:padding="0in" loext:border="none"/>
    </style:style>
    <style:style style:name="P18" style:family="paragraph" style:parent-style-name="Text_20_body" style:list-style-name="L12">
      <style:paragraph-properties fo:margin-left="0in" fo:margin-right="0in" fo:margin-top="0.0835in" fo:margin-bottom="0.0835in" style:contextual-spacing="false" fo:line-height="175%" fo:text-indent="0in" style:auto-text-indent="false" fo:padding="0in" fo:border="none"/>
      <style:text-properties style:font-name="Google Sans Flex" fo:font-size="12pt" fo:letter-spacing="normal" fo:font-weight="normal" loext:padding="0in" loext:border="none"/>
    </style:style>
    <style:style style:name="P19" style:family="paragraph" style:parent-style-name="Text_20_body" style:list-style-name="L13">
      <style:paragraph-properties fo:margin-left="0in" fo:margin-right="0in" fo:margin-top="0.0835in" fo:margin-bottom="0.0835in" style:contextual-spacing="false" fo:line-height="175%" fo:text-indent="0in" style:auto-text-indent="false" fo:padding="0in" fo:border="none"/>
      <style:text-properties style:font-name="Google Sans Flex" fo:font-size="12pt" fo:letter-spacing="normal" fo:font-weight="normal" loext:padding="0in" loext:border="none"/>
    </style:style>
    <style:style style:name="P20" style:family="paragraph" style:parent-style-name="Text_20_body" style:list-style-name="L4">
      <style:paragraph-properties fo:margin-left="0in" fo:margin-right="0in" fo:margin-top="0.0835in" fo:margin-bottom="0.0835in" style:contextual-spacing="false" fo:line-height="175%" fo:text-indent="0in" style:auto-text-indent="false" fo:padding="0in" fo:border="none"/>
      <style:text-properties style:font-name="Google Sans Flex" fo:font-size="12pt" fo:letter-spacing="normal" fo:font-weight="bold" loext:padding="0in" loext:border="none"/>
    </style:style>
    <style:style style:name="P21" style:family="paragraph" style:parent-style-name="Text_20_body">
      <style:paragraph-properties fo:margin-left="0in" fo:margin-right="0in" fo:margin-top="0in" fo:margin-bottom="0.0835in" style:contextual-spacing="false" style:line-height-at-least="0.2917in" fo:text-indent="0in" style:auto-text-indent="false"/>
      <style:text-properties style:font-name="Google Sans Flex" fo:font-size="16.5pt" fo:letter-spacing="normal" fo:font-weight="bold"/>
    </style:style>
    <style:style style:name="P22" style:family="paragraph" style:parent-style-name="Text_20_body" style:list-style-name="L7">
      <style:paragraph-properties fo:margin-left="0in" fo:margin-right="0in" fo:margin-top="0.0835in" fo:margin-bottom="0.0835in" style:contextual-spacing="false" style:line-height-at-least="0.2083in" fo:text-indent="0in" style:auto-text-indent="false" fo:padding="0in" fo:border="none"/>
    </style:style>
    <style:style style:name="T1" style:family="text">
      <style:text-properties fo:font-weight="bold"/>
    </style:style>
    <style:style style:name="T2" style:family="text">
      <style:text-properties fo:font-style="italic"/>
    </style:style>
    <style:style style:name="T3" style:family="text">
      <style:text-properties style:font-name="Google Sans Flex" fo:font-size="12pt" fo:letter-spacing="normal" fo:font-weight="bold" loext:padding="0in" loext:border="none"/>
    </style:style>
    <style:style style:name="T4" style:family="text">
      <style:text-properties style:font-name="Google Sans Flex" fo:font-size="12pt" fo:letter-spacing="normal" fo:font-weight="normal" loext:padding="0in" loext:border="none"/>
    </style:style>
    <style:style style:name="T5" style:family="text">
      <style:text-properties style:font-name="Google Sans Flex" fo:font-size="10.5pt" fo:letter-spacing="normal" fo:font-weight="normal" loext:padding="0in" loext:border="none"/>
    </style:style>
    <style:style style:name="T6" style:family="text">
      <style:text-properties officeooo:rsid="000b6383"/>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Smart_City_Infrastructure_Vulnerability_Audit_CIS_Report.pdf</text:p>
      <text:section text:style-name="Sect1" text:name="model-response-message-contentr_01a3684d34ba9f91">
        <text:p text:style-name="P3"><text:span text:style-name="T1">Student Name:</text:span> [<text:span text:style-name="T6">Solomon Mwaura]</text:span></text:p>
        <text:p text:style-name="P3"><text:span text:style-name="T1">Date:</text:span> March 14, 2026</text:p>
        <text:p text:style-name="P1"/>
        <text:h text:style-name="P2" text:outline-level="2">1. Scope and Objectives</text:h>
        <text:p text:style-name="P4"><text:span text:style-name="T1">Overview:</text:span> This assessment evaluates the security posture of a legacy network server integral to the <text:span text:style-name="T1">Smart City Initiative</text:span>. This server manages critical municipal infrastructure, specifically <text:span text:style-name="T1">traffic monitoring sensors</text:span> and <text:span text:style-name="T1">smart streetlight controllers</text:span>. The audit aims to identify exploitable vulnerabilities within the legacy environment (Metasploitable 2) that could lead to unauthorized system manipulation, public safety hazards, or data breaches. The assessment follows a "White Box" internal audit methodology within a controlled virtual sandbox.</text:p>
        <text:list text:style-name="L1">
          <text:list-item>
            <text:p text:style-name="P8"><text:span text:style-name="T1">System(s) Assessed:</text:span> Legacy Municipal Infrastructure Server (Metasploitable 2)</text:p>
          </text:list-item>
          <text:list-item>
            <text:p text:style-name="P8"><text:span text:style-name="T1">IP Address of Target:</text:span> 192.168.56.102</text:p>
          </text:list-item>
          <text:list-item>
            <text:p text:style-name="P8"><text:span text:style-name="T1">Tools Used:</text:span> Nessus Professional, Nmap (Network Mapper), Kali Linux VM</text:p>
          </text:list-item>
          <text:list-item>
            <text:p text:style-name="P8"><text:span text:style-name="T1">Compliance Framework:</text:span> <text:span text:style-name="T1">NIST Cybersecurity Framework (CSF)</text:span> and <text:span text:style-name="T1">CIS Controls v8</text:span></text:p>
          </text:list-item>
          <text:list-item>
            <text:p text:style-name="P8"><text:span text:style-name="T1">Assessment Goal:</text:span> To identify security weaknesses, assess risk levels regarding city operations, and provide a prioritized remediation roadmap to harden the infrastructure against cyber threats.</text:p>
          </text:list-item>
        </text:list>
        <text:p text:style-name="P1"/>
        <text:h text:style-name="P2" text:outline-level="2">2. Asset Identification and Categorization</text:h>
        <text:p text:style-name="P3"><text:span text:style-name="T1">Overview:</text:span> Active reconnaissance was performed to map the attack surface. 23 open ports were identified, representing the communication channels for city data and remote administration. Assets are categorized by their role in maintaining municipal service continuity.</text:p>
        <text:p text:style-name="P5">List of Identified Assets and Running Services:</text:p>
        <text:list text:style-name="L2">
          <text:list-item>
            <text:p text:style-name="P9"><text:span text:style-name="T1">vsftpd 2.3.4 (Port 21):</text:span> An outdated FTP service used for infrastructure firmware updates.</text:p>
          </text:list-item>
          <text:list-item>
            <text:p text:style-name="P9"><text:span text:style-name="T1">Telnet &amp; R-Services (Ports 23, 512-514):</text:span> Legacy remote administration tools lacking encryption.</text:p>
          </text:list-item>
          <text:list-item>
            <text:p text:style-name="P9"><text:span text:style-name="T1">Apache 2.2.8 &amp; Tomcat 1.1 (Ports 80, 8180):</text:span> Web servers hosting the traffic dashboard and lighting schedules.</text:p>
          </text:list-item>
          <text:list-item>
            <text:p text:style-name="P9"><text:span text:style-name="T1">MySQL &amp; PostgreSQL (Ports 3306, 5432):</text:span> Databases storing real-time sensor data and administrative accounts.</text:p>
          </text:list-item>
          <text:list-item>
            <text:p text:style-name="P9"><text:span text:style-name="T1">Bindshell (Port 1524):</text:span> An unauthorized root shell listener providing immediate system control.</text:p>
          </text:list-item>
        </text:list>
        <text:p text:style-name="P5">Potential Security Risks Identified from Initial Asset Review:</text:p>
        <text:list text:style-name="L3">
          <text:list-item>
            <text:p text:style-name="P10"><text:span text:style-name="T1">Critical Backdoor Exposure:</text:span> Port 1524 (Bindshell) allows unauthenticated root access, enabling immediate takeover of city lights.</text:p>
          </text:list-item>
          <text:list-item>
            <text:p text:style-name="P10"><text:span text:style-name="T1">Cleartext Management Protocols:</text:span> Use of Telnet/R-services allows for credential sniffing and "Man-in-the-Middle" command injection.</text:p>
          </text:list-item>
          <text:list-item>
            <text:p text:style-name="P10"><text:span text:style-name="T1">Excessive Attack Surface:</text:span> Running 23 services on a single node violates the principle of "Least Functionality."</text:p>
          </text:list-item>
        </text:list>
        <text:p text:style-name="P1"/>
        <text:h text:style-name="P2" text:outline-level="2"><text:soft-page-break/>3. Security Controls and Policies Evaluation</text:h>
        <text:p text:style-name="P4"><text:span text:style-name="T1">Overview:</text:span> An analysis of existing security mechanisms revealed a total failure in defense-in-depth layers. Current controls do not meet minimum industry standards for critical infrastructure.</text:p>
        <text:list text:style-name="L4">
          <text:list-item>
            <text:p text:style-name="P11"><text:span text:style-name="T1">Access Control Mechanisms in Place:</text:span> None. The presence of remote shells (VNC/Bindshell) bypasses all traditional access controls.</text:p>
          </text:list-item>
          <text:list-item>
            <text:p text:style-name="P11"><text:span text:style-name="T1">Encryption Used for Data Protection:</text:span> Ineffective. SSL/TLS services are outdated (CVSS 9.8), and management protocols send data in cleartext.</text:p>
          </text:list-item>
          <text:list-item>
            <text:p text:style-name="P20">Existing Security Policies Implemented:</text:p>
            <text:list>
              <text:list-item>
                <text:p text:style-name="P11"><text:span text:style-name="T1">Firewall:</text:span> Non-existent; all internal database and administration ports are exposed.</text:p>
              </text:list-item>
              <text:list-item>
                <text:p text:style-name="P11"><text:span text:style-name="T1">Patch Management:</text:span> Failed; the system runs an end-of-life Linux Kernel (2.6) on Ubuntu 8.04.</text:p>
              </text:list-item>
            </text:list>
          </text:list-item>
          <text:list-item>
            <text:p text:style-name="P11"><text:span text:style-name="T1">Security Control Gaps Identified:</text:span> * Lack of Multi-Factor Authentication (MFA).</text:p>
            <text:list>
              <text:list-item>
                <text:p text:style-name="P11">Absence of network segmentation, allowing direct access to the "core" of the city’s lighting grid.</text:p>
              </text:list-item>
            </text:list>
          </text:list-item>
        </text:list>
        <text:p text:style-name="P1"/>
        <text:h text:style-name="P2" text:outline-level="2">4. Threat Modeling and Risk Assessment</text:h>
        <text:p text:style-name="P3"><text:span text:style-name="T1">Overview:</text:span> Vulnerabilities are prioritized based on CVSS scores and their potential for physical-world disruption.</text:p>
        <text:p text:style-name="P5">Top Vulnerabilities Identified:</text:p>
        <text:list text:style-name="L5">
          <text:list-item>
            <text:p text:style-name="P12"><text:span text:style-name="T1">VNC 'Gain a Shell' &amp; Bindshell (CVSS 10.0/9.8):</text:span> These allow unauthenticated remote code execution (RCE).</text:p>
            <text:list>
              <text:list-item>
                <text:p text:style-name="P12"><text:span text:style-name="T2">Impact:</text:span> An attacker could black out streetlights or cause traffic accidents by manipulating signal timing.</text:p>
              </text:list-item>
            </text:list>
          </text:list-item>
          <text:list-item>
            <text:p text:style-name="P12"><text:span text:style-name="T1">vsftpd Backdoor (CVE-2011-2523):</text:span> Allows instant root access via a specific network payload.</text:p>
          </text:list-item>
          <text:list-item>
            <text:p text:style-name="P12"><text:span text:style-name="T1">Samba MS08-067 (CVSS 10.0):</text:span> Enables remote exploitation of file-sharing services.</text:p>
          </text:list-item>
        </text:list>
        <text:p text:style-name="P5">Threat Modeling Observations:</text:p>
        <text:list text:style-name="L6">
          <text:list-item>
            <text:p text:style-name="P13"><text:span text:style-name="T1">Potential Attack Vectors:</text:span> Remote Code Execution (RCE) via unpatched services and Authentication Bypass via active backdoors.</text:p>
          </text:list-item>
          <text:list-item>
            <text:p text:style-name="P13"><text:span text:style-name="T1">Likelihood of Exploitation:</text:span> <text:span text:style-name="T1">Extremely High.</text:span> Automated exploit modules are publicly available for nearly every identified vulnerability.</text:p>
          </text:list-item>
          <text:list-item>
            <text:p text:style-name="P13"><text:span text:style-name="T1">Impact if Exploited:</text:span> <text:span text:style-name="T1">Catastrophic.</text:span> Compromise leads to loss of life (traffic accidents), data theft (resident records), and total loss of public trust.</text:p>
          </text:list-item>
        </text:list>
        <text:p text:style-name="P1"/>
        <text:h text:style-name="P2" text:outline-level="2">5. Security Posture Testing and Validation</text:h>
        <text:p text:style-name="P3"><text:span text:style-name="T1">Overview:</text:span> Manual verification was conducted to confirm that automated Nessus findings were not false positives.</text:p>
        <text:p text:style-name="P5">Validated Vulnerabilities and Manual Testing Results:</text:p>
        <text:list text:style-name="L7">
          <text:list-item>
            <text:p text:style-name="P22"><text:span text:style-name="T3">Root Shell Access (Port 1524):</text:span><text:span text:style-name="T4"> Verified via </text:span><text:span text:style-name="Source_20_Text"><text:span text:style-name="T5">netcat</text:span></text:span><text:span text:style-name="T4">. Instant root shell granted without a password.</text:span></text:p>
          </text:list-item>
          <text:list-item>
            <text:p text:style-name="P22"><text:span text:style-name="T3">Anonymous FTP Access:</text:span><text:span text:style-name="T4"> Confirmed; </text:span><text:span text:style-name="Source_20_Text"><text:span text:style-name="T5">anonymous</text:span></text:span><text:span text:style-name="T4"> login allowed full read/write access to sensor logs.</text:span></text:p>
          </text:list-item>
          <text:list-item>
            <text:p text:style-name="P22"><text:span text:style-name="T3">Cleartext Interception:</text:span><text:span text:style-name="T4"> Verified via </text:span><text:span text:style-name="Source_20_Text"><text:span text:style-name="T5">tcpdump</text:span></text:span><text:span text:style-name="T4">; Telnet credentials and traffic commands were captured in readable text.</text:span></text:p>
          </text:list-item>
        </text:list>
        <text:p text:style-name="P5">Additional Findings from Manual Testing:</text:p>
        <text:list text:style-name="L8">
          <text:list-item>
            <text:p text:style-name="P14"><text:soft-page-break/><text:span text:style-name="T1">Default Credentials:</text:span> Essential services (Tomcat/Databases) remain configured with factory defaults (e.g., admin:admin).</text:p>
          </text:list-item>
          <text:list-item>
            <text:p text:style-name="P14"><text:span text:style-name="T1">Weak SSH Configuration:</text:span> Verified that root login is enabled and the service uses deprecated, weak ciphers.</text:p>
          </text:list-item>
        </text:list>
        <text:p text:style-name="P1"/>
        <text:h text:style-name="P2" text:outline-level="2">6. Monitoring, Logging, and Incident Response Readiness</text:h>
        <text:p text:style-name="P4"><text:span text:style-name="T1">Overview:</text:span> Analysis of system logs (syslog, auth.log) confirmed that while events are recorded, the city has zero real-time detection or response capability.</text:p>
        <text:list text:style-name="L9">
          <text:list-item>
            <text:p text:style-name="P15"><text:span text:style-name="T1">Logging Mechanisms Identified:</text:span> Local system logs only. No centralized SIEM or remote log forwarding.</text:p>
          </text:list-item>
          <text:list-item>
            <text:p text:style-name="P15"><text:span text:style-name="T1">Incident Response Capabilities:</text:span> Minimal. There are no automated alerts for the root shell connections validated in Part 5.</text:p>
          </text:list-item>
          <text:list-item>
            <text:p text:style-name="P15"><text:span text:style-name="T1">Gaps in Monitoring and Logging:</text:span> * <text:span text:style-name="T1">No Log Integrity:</text:span> Local logs can be easily deleted by an attacker with root access.</text:p>
            <text:list>
              <text:list-item>
                <text:p text:style-name="P15"><text:span text:style-name="T1">Lack of Traffic Analysis:</text:span> No monitoring for data exfiltration or suspicious spikes in traffic sensor activity.</text:p>
              </text:list-item>
            </text:list>
          </text:list-item>
        </text:list>
        <text:p text:style-name="P1"/>
        <text:h text:style-name="P2" text:outline-level="2">7. Recommendations and Security Hardening Measures</text:h>
        <text:p text:style-name="P3"><text:span text:style-name="T1">Overview:</text:span> The following strategies align with CIS Controls v8 to transition the infrastructure to a secure state.</text:p>
        <text:p text:style-name="P5">Mitigation Strategies:</text:p>
        <text:list text:style-name="L10">
          <text:list-item>
            <text:p text:style-name="P16"><text:span text:style-name="T1">Immediate Service Decommissioning (CIS Control 2.1):</text:span> Disable Ports 1524, 21, and 6667. Replace FTP with <text:span text:style-name="T1">SFTP</text:span> for secure firmware updates.</text:p>
          </text:list-item>
          <text:list-item>
            <text:p text:style-name="P16"><text:span text:style-name="T1">OS Migration and Patching (CIS Control 7.1):</text:span> Migrate services to a supported OS (e.g., Ubuntu 24.04 LTS). Implement a 30-day patch cycle for all smart city nodes.</text:p>
          </text:list-item>
          <text:list-item>
            <text:p text:style-name="P16"><text:span text:style-name="T1">Enforce MFA and Key-Based Access (CIS Control 6.1):</text:span> Require Multi-Factor Authentication for all administrative consoles. Disable password-based SSH in favor of SSH keys.</text:p>
          </text:list-item>
        </text:list>
        <text:p text:style-name="P5">Other Security Hardening Recommendations:</text:p>
        <text:list text:style-name="L11">
          <text:list-item>
            <text:p text:style-name="P17"><text:span text:style-name="T1">Network Segmentation (CIS Control 12.2):</text:span> Place the server in an isolated VLAN restricted by a firewall to "Least Privilege" communication.</text:p>
          </text:list-item>
          <text:list-item>
            <text:p text:style-name="P17"><text:span text:style-name="T1">Centralized Logging (CIS Control 8.2):</text:span> Forward all logs to a remote, read-only SIEM server to ensure an immutable audit trail for forensic investigations.</text:p>
          </text:list-item>
        </text:list>
        <text:p text:style-name="P1"/>
        <text:h text:style-name="P2" text:outline-level="2">8. Summary and Conclusion</text:h>
        <text:p text:style-name="P3"><text:span text:style-name="T1">Overview:</text:span> The legacy traffic and lighting server is currently in a state of <text:span text:style-name="T1">Critical Exposure</text:span>. It lacks basic security controls, making it an easy target for even low-skilled attackers.</text:p>
        <text:p text:style-name="P5">Key Findings:</text:p>
        <text:list text:style-name="L12">
          <text:list-item>
            <text:p text:style-name="P18">Multiple <text:span text:style-name="T1">CVSS 10.0</text:span> vulnerabilities allow for instant remote takeover.</text:p>
          </text:list-item>
          <text:list-item>
            <text:p text:style-name="P18">The absence of encryption and MFA leaves all municipal data and physical controls vulnerable to interception and manipulation.</text:p>
          </text:list-item>
          <text:list-item>
            <text:p text:style-name="P18"><text:soft-page-break/>There is no centralized monitoring to detect or respond to an ongoing breach.</text:p>
          </text:list-item>
        </text:list>
        <text:p text:style-name="P5">Next Steps:</text:p>
        <text:list text:style-name="L13">
          <text:list-item>
            <text:p text:style-name="P19"><text:span text:style-name="T1">Immediate Remediation:</text:span> Take the server offline or firewall all ports except 443/22.</text:p>
          </text:list-item>
          <text:list-item>
            <text:p text:style-name="P19"><text:span text:style-name="T1">Hardening:</text:span> Implement the CIS-aligned remediation plan, focusing on patching and MFA.</text:p>
          </text:list-item>
          <text:list-item>
            <text:p text:style-name="P19"><text:span text:style-name="T1">Verification:</text:span> Conduct a follow-up Nessus scan to validate that all "Critical" and "High" risks have been resolved.</text:p>
          </text:list-item>
        </text:list>
      </text:section>
      <text:p text:style-name="P7"><draw:frame draw:style-name="fr1" draw:name="Frame1" text:anchor-type="char" svg:x="0in" svg:width="0.0161in" draw:z-index="0"><draw:text-box fo:min-height="0.0161in"><text:h text:style-name="P6" text:outline-level="2">Gemini said</text:h></draw:text-box></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Flex" svg:font-family="'Google Sans Flex', 'Google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styles>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3.2201in" fo:page-height="17in" style:num-format="1" style:print-orientation="portrait" fo:margin-top="0.7874in" fo:margin-bottom="0.7874in" fo:margin-left="0.7189in" fo:margin-right="0.7811in" fo:background-color="#eee0d1" style:writing-mode="lr-tb" style:layout-grid-color="#c0c0c0" style:layout-grid-lines="20" style:layout-grid-base-height="0.278in" style:layout-grid-ruby-height="0.139in" style:layout-grid-mode="none" style:layout-grid-ruby-below="false" style:layout-grid-print="false" style:layout-grid-display="false" draw:fill="gradient" draw:fill-color="#eee0d1" draw:fill-gradient-name="Pastel_20_Bouquet"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gradient" draw:background-size="full" draw:fill-color="#eee0d1" draw:fill-gradient-name="Pastel_20_Bouquet"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4T09:53:13.686977573</meta:creation-date>
    <dc:date>2026-04-25T20:57:16.438827892</dc:date>
    <meta:editing-duration>PT4M6S</meta:editing-duration>
    <meta:editing-cycles>2</meta:editing-cycles>
    <meta:generator>LibreOffice/24.2.7.2$Linux_X86_64 LibreOffice_project/420$Build-2</meta:generator>
    <meta:document-statistic meta:table-count="0" meta:image-count="0" meta:object-count="0" meta:page-count="4" meta:paragraph-count="77" meta:word-count="1074" meta:character-count="7587" meta:non-whitespace-character-count="6637"/>
  </office:meta>
</office:document-meta>
</file>