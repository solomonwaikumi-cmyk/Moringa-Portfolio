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5in" table:align="left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6.1403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Heading_20_3">
      <style:text-properties style:font-name="Google Sans"/>
    </style:style>
    <style:style style:name="P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6" style:family="paragraph" style:parent-style-name="Table_20_Contents">
      <style:paragraph-properties fo:margin-top="0in" fo:margin-bottom="0.0972in" style:contextual-spacing="false" fo:line-height="114%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0" style:family="paragraph" style:parent-style-name="Text_20_body">
      <style:text-properties style:font-name="Google Sans" officeooo:rsid="0011e5da" officeooo:paragraph-rsid="0011e5da"/>
    </style:style>
    <style:style style:name="P11" style:family="paragraph" style:parent-style-name="Heading_20_3">
      <style:text-properties style:font-name="Google Sans" officeooo:rsid="0011d765" officeooo:paragraph-rsid="0011d765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SOLOMON MWAURA</text:h>
      <text:p text:style-name="P10">Cybersecurity: Moringa School</text:p>
      <text:h text:style-name="P2" text:outline-level="3"/>
      <text:h text:style-name="P2" text:outline-level="3"/>
      <text:h text:style-name="P2" text:outline-level="3">Brief Attack Summary</text:h>
      <text:p text:style-name="P4"><text:span text:style-name="T2">The attack followed a sophisticated progression beginning with </text:span><text:span text:style-name="T3">Reconnaissance</text:span><text:span text:style-name="T2">, where attackers likely identified key billing personnel and technical details about the organization's software environment. This allowed them to proceed to </text:span><text:span text:style-name="T3">Weaponization</text:span><text:span text:style-name="T2">, crafting a malicious PDF (</text:span><text:span text:style-name="Source_20_Text"><text:span text:style-name="T2">Invoice_Payment.pdf</text:span></text:span><text:span text:style-name="T2">) embedded with a zero-day exploit (</text:span><text:span text:style-name="Source_20_Text"><text:span text:style-name="T2">CVE-2024-XXXX</text:span></text:span><text:span text:style-name="T2">) designed to bypass standard defenses.</text:span></text:p>
      <text:p text:style-name="P9">During the <text:span text:style-name="T1">Delivery</text:span> phase, the attackers utilized a targeted phishing email with the subject "Urgent Invoice: Payment Due," spoofing a legitimate sender to deceive the victim. <text:span text:style-name="T1">Exploitation</text:span> occurred immediately upon the user opening the attachment, triggering the zero-day vulnerability. This allowed for <text:span text:style-name="T1">Installation</text:span>, where the malware established persistence via a registry key modification and downloaded additional payloads.</text:p>
      <text:p text:style-name="P4"><text:span text:style-name="T2">Once established, the malware entered the </text:span><text:span text:style-name="T3">Command and Control (C2)</text:span><text:span text:style-name="T2"> phase, beaconing out to </text:span><text:span text:style-name="Source_20_Text"><text:span text:style-name="T2">c2-ecommerce[.]com</text:span></text:span><text:span text:style-name="T2"> over encrypted HTTPS to receive further instructions. Finally, in the </text:span><text:span text:style-name="T3">Actions on Objectives</text:span><text:span text:style-name="T2"> phase, attackers moved laterally using Mimikatz to compromise the </text:span><text:span text:style-name="Source_20_Text"><text:span text:style-name="T2">PAYMENT-SRV01</text:span></text:span><text:span text:style-name="T2"> server, ex filtrated sensitive payment card data to an external domain, and attempted to monetize the breach by leaving a ransom note.</text:span></text:p>
      <text:p text:style-name="Horizontal_20_Line"/>
      <text:h text:style-name="P1" text:outline-level="3">Cyber Kill Chain IOC Mapping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<text:span text:style-name="Strong_20_Emphasis"><text:span text:style-name="T2">Cyber Kill Chain Phase</text:span></text:span></text:p>
            </table:table-cell>
            <table:table-cell table:style-name="Table1.A1" office:value-type="string">
              <text:p text:style-name="P5"><text:span text:style-name="Strong_20_Emphasis"><text:span text:style-name="T2">Attack Activity Description</text:span></text:span></text:p>
            </table:table-cell>
            <table:table-cell table:style-name="Table1.A1" office:value-type="string">
              <text:p text:style-name="P5"><text:span text:style-name="Strong_20_Emphasis"><text:span text:style-name="T2">Indicators of Compromise (IOCs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7">1. Reconnaissance</text:p>
          </table:table-cell>
          <table:table-cell table:style-name="Table1.A1" office:value-type="string">
            <text:p text:style-name="P8">Gathering info on billing emails and PDF software. <text:span text:style-name="T4">(Implied by targeted nature of email)</text:span></text:p>
          </table:table-cell>
          <table:table-cell table:style-name="Table1.A1" office:value-type="string">
            <text:p text:style-name="P8">N/A (Pre-attack phase)</text:p>
          </table:table-cell>
        </table:table-row>
        <table:table-row>
          <table:table-cell table:style-name="Table1.A1" office:value-type="string">
            <text:p text:style-name="P7">2. Weaponization</text:p>
          </table:table-cell>
          <table:table-cell table:style-name="Table1.A1" office:value-type="string">
            <text:p text:style-name="P8">Creation of malicious PDF with zero-day exploit.</text:p>
          </table:table-cell>
          <table:table-cell table:style-name="Table1.A1" office:value-type="string">
            <text:p text:style-name="P3">• <text:span text:style-name="T3">File Name:</text:span><text:span text:style-name="T2"> </text:span><text:span text:style-name="Source_20_Text"><text:span text:style-name="T2">Invoice_Payment.pdf</text:span></text:span></text:p>
            <text:p text:style-name="P6"/>
            <text:p text:style-name="P3">• <text:span text:style-name="T3">Exploit:</text:span><text:span text:style-name="T2"> </text:span><text:span text:style-name="Source_20_Text"><text:span text:style-name="T2">CVE-2024-XXXX</text:span></text:span></text:p>
            <text:p text:style-name="P6"/>
            <text:p text:style-name="P3">• <text:span text:style-name="T3">Hash:</text:span><text:span text:style-name="T2"> </text:span><text:span text:style-name="Source_20_Text"><text:span text:style-name="T2">7a5d3f1eab7428b65d7c3e457e6c1f3bb6e3ef927d1b98273a4d9b567e81f631</text:span></text:span></text:p>
          </table:table-cell>
        </table:table-row>
        <table:table-row>
          <table:table-cell table:style-name="Table1.A1" office:value-type="string">
            <text:p text:style-name="P7">3. Delivery</text:p>
          </table:table-cell>
          <table:table-cell table:style-name="Table1.A1" office:value-type="string">
            <text:p text:style-name="P8">Phishing email sent to victim.</text:p>
          </table:table-cell>
          <table:table-cell table:style-name="Table1.A1" office:value-type="string">
            <text:p text:style-name="P3">• <text:span text:style-name="T3">Subject:</text:span><text:span text:style-name="T2"> “Urgent Invoice: Payment Due”</text:span></text:p>
            <text:p text:style-name="P6"/>
            <text:p text:style-name="P3">• <text:span text:style-name="T3">Sender:</text:span><text:span text:style-name="T2"> </text:span><text:span text:style-name="Source_20_Text"><text:span text:style-name="T2">billing@[spoofedcompany].com</text:span></text:span></text:p>
          </table:table-cell>
        </table:table-row>
        <table:table-row>
          <table:table-cell table:style-name="Table1.A1" office:value-type="string">
            <text:p text:style-name="P7">4. Exploitation</text:p>
          </table:table-cell>
          <table:table-cell table:style-name="Table1.A1" office:value-type="string">
            <text:p text:style-name="P8">Execution of code via PDF reader vulnerability.</text:p>
          </table:table-cell>
          <table:table-cell table:style-name="Table1.A1" office:value-type="string">
            <text:p text:style-name="P3">• <text:span text:style-name="T3">Exploit Behavior:</text:span><text:span text:style-name="T2"> Zero-day execution in PDF reader</text:span></text:p>
          </table:table-cell>
        </table:table-row>
        <table:table-row>
          <table:table-cell table:style-name="Table1.A1" office:value-type="string">
            <text:p text:style-name="P7">5. Installation</text:p>
          </table:table-cell>
          <table:table-cell table:style-name="Table1.A1" office:value-type="string">
            <text:p text:style-name="P8">Malware establishes persistence and downloads tools.</text:p>
          </table:table-cell>
          <table:table-cell table:style-name="Table1.A1" office:value-type="string">
            <text:p text:style-name="P3">• <text:span text:style-name="T3">Registry Key:</text:span><text:span text:style-name="T2"> </text:span><text:span text:style-name="Source_20_Text"><text:span text:style-name="T2">HKLM\...\Run\UpdaterScript</text:span></text:span></text:p>
            <text:p text:style-name="P6"/>
            <text:p text:style-name="P3">• <text:span text:style-name="T3">File Path:</text:span><text:span text:style-name="T2"> </text:span><text:span text:style-name="Source_20_Text"><text:span text:style-name="T2">C:\Users\[user]\AppData\Local\Temp\Updater.bat</text:span></text:span></text:p>
          </table:table-cell>
        </table:table-row>
        <table:table-row>
          <table:table-cell table:style-name="Table1.A1" office:value-type="string">
            <text:p text:style-name="P7">6. Command &amp; Control</text:p>
          </table:table-cell>
          <table:table-cell table:style-name="Table1.A1" office:value-type="string">
            <text:p text:style-name="P8">Establishing remote communication channel.</text:p>
          </table:table-cell>
          <table:table-cell table:style-name="Table1.A1" office:value-type="string">
            <text:p text:style-name="P3">• <text:span text:style-name="T3">Domain:</text:span><text:span text:style-name="T2"> </text:span><text:span text:style-name="Source_20_Text"><text:span text:style-name="T2">c2-ecommerce[.]com</text:span></text:span></text:p>
            <text:p text:style-name="P6"/>
            <text:p text:style-name="P3">• <text:span text:style-name="T3">IP:</text:span><text:span text:style-name="T2"> </text:span><text:span text:style-name="Source_20_Text"><text:span text:style-name="T2">203.0.113.45</text:span></text:span></text:p>
            <text:p text:style-name="P6"/>
            <text:p text:style-name="P3">• <text:span text:style-name="T3">Port:</text:span><text:span text:style-name="T2"> 443 (HTTPS)</text:span></text:p>
          </table:table-cell>
        </table:table-row>
        <table:table-row>
          <table:table-cell table:style-name="Table1.A1" office:value-type="string">
            <text:p text:style-name="P7">7. Actions on <text:soft-page-break/>Objectives</text:p>
          </table:table-cell>
          <table:table-cell table:style-name="Table1.A1" office:value-type="string">
            <text:p text:style-name="P8">Lateral movement, <text:soft-page-break/>data theft, and ransom demand.</text:p>
          </table:table-cell>
          <table:table-cell table:style-name="Table1.A1" office:value-type="string">
            <text:p text:style-name="P3">• <text:span text:style-name="T3">Tool:</text:span><text:span text:style-name="T2"> Mimikatz</text:span></text:p>
            <text:p text:style-name="P6"><text:soft-page-break/></text:p>
            <text:p text:style-name="P3">• <text:span text:style-name="T3">Target:</text:span><text:span text:style-name="T2"> </text:span><text:span text:style-name="Source_20_Text"><text:span text:style-name="T2">PAYMENT-SRV01</text:span></text:span></text:p>
            <text:p text:style-name="P6"/>
            <text:p text:style-name="P3">• <text:span text:style-name="T3">Exfiltration Domain:</text:span><text:span text:style-name="T2"> </text:span><text:span text:style-name="Source_20_Text"><text:span text:style-name="T2">exfiltration-ecommerce[.]com</text:span></text:span></text:p>
            <text:p text:style-name="P6"/>
            <text:p text:style-name="P3">• <text:span text:style-name="T3">Ransom Note:</text:span><text:span text:style-name="T2"> </text:span><text:span text:style-name="Source_20_Text"><text:span text:style-name="T2">READ_ME.txt</text:span></text:span><text:span text:style-name="T2"> (Demand: 5 Bitcoin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fo:background-color="#eee0d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gradient-name="Pastel_20_Bouquet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gradient-name="Pastel_20_Bouque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7:24:37.575032543</meta:creation-date>
    <dc:date>2026-04-25T19:27:44.215611257</dc:date>
    <meta:editing-duration>PT5M29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2" meta:paragraph-count="40" meta:word-count="321" meta:character-count="2453" meta:non-whitespace-character-count="2172"/>
  </office:meta>
</office:document-meta>
</file>